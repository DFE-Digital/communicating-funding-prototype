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"/>
    <style:style style:name="ce4" style:family="table-cell" style:parent-style-name="Default" style:data-style-name="N1"/>
    <style:style style:name="ce5" style:family="table-cell" style:parent-style-name="Default" style:data-style-name="N39"/>
    <style:style style:name="ce6" style:family="table-cell" style:parent-style-name="Default" style:data-style-name="N4"/>
    <style:style style:name="ce7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40"/>
    <style:style style:name="ce9" style:family="table-cell" style:parent-style-name="Default" style:data-style-name="N41"/>
    <style:style style:name="ce10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13"/>
    <style:style style:name="ce12" style:family="table-cell" style:parent-style-name="Default" style:data-style-name="N37"/>
    <style:style style:name="ce13" style:family="table-cell" style:parent-style-name="Per_32_cent" style:data-style-name="N37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38"/>
    <style:style style:name="ce15" style:family="table-cell" style:parent-style-name="Default" style:data-style-name="N36"/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1.765cm"/>
    </style:style>
    <style:style style:name="ce18" style:family="table-cell" style:parent-style-name="Default" style:data-style-name="N2"/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6.95854166666667cm"/>
    </style:style>
    <style:style style:name="co9" style:family="table-column">
      <style:table-column-properties fo:break-before="auto" style:column-width="13.8641666666667cm"/>
    </style:style>
    <style:style style:name="co10" style:family="table-column">
      <style:table-column-properties fo:break-before="auto" style:column-width="4.365625cm"/>
    </style:style>
    <style:style style:name="ro1" style:family="table-row">
      <style:table-row-properties style:row-height="51pt" style:use-optimal-row-height="true" fo:break-before="auto"/>
    </style:style>
    <style:style style:name="ro2" style:family="table-row">
      <style:table-row-properties style:row-height="34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0000003_detailed_break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3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2">
            <text:p>UKPRN</text:p>
          </table:table-cell>
          <table:table-cell office:value-type="string" table:style-name="ce2">
            <text:p>Funding reference</text:p>
          </table:table-cell>
          <table:table-cell office:value-type="string" table:style-name="ce2">
            <text:p>Funding <text:s/>period</text:p>
          </table:table-cell>
          <table:table-cell office:value-type="string" table:style-name="ce2">
            <text:p>Total funding (£)</text:p>
          </table:table-cell>
          <table:table-cell office:value-type="string" table:style-name="ce2">
            <text:p>Funding line item</text:p>
          </table:table-cell>
          <table:table-cell office:value-type="string" table:style-name="ce2">
            <text:p>Funding line total (£)</text:p>
          </table:table-cell>
          <table:table-cell office:value-type="string" table:style-name="ce2">
            <text:p>Distribution period: August 2025 (£)</text:p>
          </table:table-cell>
          <table:table-cell office:value-type="string" table:style-name="ce2">
            <text:p>Distribution period: September 2025 <text:s/>(£)</text:p>
          </table:table-cell>
          <table:table-cell office:value-type="string" table:style-name="ce2">
            <text:p>Distribution period: October 2025 <text:s/>(£)</text:p>
          </table:table-cell>
          <table:table-cell office:value-type="string" table:style-name="ce2">
            <text:p>Distribution period: November 2025 <text:s/>(£)</text:p>
          </table:table-cell>
          <table:table-cell office:value-type="string" table:style-name="ce2">
            <text:p>Distribution period: December 2025 <text:s/>(£)</text:p>
          </table:table-cell>
          <table:table-cell office:value-type="string" table:style-name="ce2">
            <text:p>Distribution period: January 2026 <text:s/>(£)</text:p>
          </table:table-cell>
          <table:table-cell office:value-type="string" table:style-name="ce2">
            <text:p>Distribution period: February 2026 <text:s/>(£)</text:p>
          </table:table-cell>
          <table:table-cell office:value-type="string" table:style-name="ce2">
            <text:p>Distribution period: March 2026 (£)</text:p>
          </table:table-cell>
          <table:table-cell office:value-type="string" table:style-name="ce2">
            <text:p>Distribution period: April 2026 (£)</text:p>
          </table:table-cell>
          <table:table-cell office:value-type="string" table:style-name="ce2">
            <text:p>Distribution period: May 2026 (£)</text:p>
          </table:table-cell>
          <table:table-cell office:value-type="string" table:style-name="ce2">
            <text:p>Distribution period: June 2026 (£)</text:p>
          </table:table-cell>
          <table:table-cell office:value-type="string" table:style-name="ce2">
            <text:p>Distribution period: July 2026 (£)</text:p>
          </table:table-cell>
          <table:table-cell table:number-columns-repeated="16366"/>
        </table:table-row>
        <table:table-row table:style-name="ro2">
          <table:table-cell office:value-type="float" office:value="900000000" table:style-name="ce1">
            <text:p>900000000</text:p>
          </table:table-cell>
          <table:table-cell office:value-type="string" table:style-name="ce1">
            <text:p>Adult skills fund</text:p>
          </table:table-cell>
          <table:table-cell office:value-type="string" table:style-name="ce2">
            <text:p>Academic year 2026 to 2027</text:p>
          </table:table-cell>
          <table:table-cell office:value-type="float" office:value="4259950" table:style-name="ce3">
            <text:p>4,259,950</text:p>
          </table:table-cell>
          <table:table-cell office:value-type="string" table:style-name="ce1">
            <text:p>Adult skills core</text:p>
          </table:table-cell>
          <table:table-cell office:value-type="float" office:value="1957492" table:style-name="ce4">
            <text:p>1957492</text:p>
          </table:table-cell>
          <table:table-cell office:value-type="float" office:value="163124.29999999999" table:style-name="ce5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table:number-columns-repeated="16366"/>
        </table:table-row>
        <table:table-row table:style-name="ro3">
          <table:table-cell table:number-columns-repeated="4" table:style-name="ce1"/>
          <table:table-cell office:value-type="string" table:style-name="ce1">
            <text:p>Tailored learning</text:p>
          </table:table-cell>
          <table:table-cell office:value-type="float" office:value="2203431" table:style-name="ce1">
            <text:p>2203431</text:p>
          </table:table-cell>
          <table:table-cell office:value-type="float" office:value="18361.75" table:style-name="ce1">
            <text:p>18361.75</text:p>
          </table:table-cell>
          <table:table-cell office:value-type="float" office:value="18361.75" table:style-name="ce1">
            <text:p>18361.75</text:p>
          </table:table-cell>
          <table:table-cell office:value-type="float" office:value="18361.75" table:style-name="ce5">
            <text:p>18361.8</text:p>
          </table:table-cell>
          <table:table-cell office:value-type="float" office:value="18361.75" table:style-name="ce1">
            <text:p>18361.75</text:p>
          </table:table-cell>
          <table:table-cell office:value-type="float" office:value="18361.75" table:style-name="ce1">
            <text:p>18361.75</text:p>
          </table:table-cell>
          <table:table-cell office:value-type="float" office:value="18361.75" table:style-name="ce1">
            <text:p>18361.75</text:p>
          </table:table-cell>
          <table:table-cell office:value-type="float" office:value="18361.75" table:style-name="ce1">
            <text:p>18361.75</text:p>
          </table:table-cell>
          <table:table-cell office:value-type="float" office:value="18361.75" table:style-name="ce1">
            <text:p>18361.75</text:p>
          </table:table-cell>
          <table:table-cell office:value-type="float" office:value="18361.75" table:style-name="ce1">
            <text:p>18361.75</text:p>
          </table:table-cell>
          <table:table-cell office:value-type="float" office:value="18361.75" table:style-name="ce1">
            <text:p>18361.75</text:p>
          </table:table-cell>
          <table:table-cell office:value-type="float" office:value="18361.75" table:style-name="ce1">
            <text:p>18361.75</text:p>
          </table:table-cell>
          <table:table-cell office:value-type="float" office:value="18361.75" table:style-name="ce1">
            <text:p>18361.75</text:p>
          </table:table-cell>
          <table:table-cell table:number-columns-repeated="16366"/>
        </table:table-row>
        <table:table-row table:style-name="ro3">
          <table:table-cell table:number-columns-repeated="4" table:style-name="ce1"/>
          <table:table-cell office:value-type="string" table:style-name="ce1">
            <text:p>Innovative provi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3">
          <table:table-cell table:number-columns-repeated="4" table:style-name="ce1"/>
          <table:table-cell office:value-type="string" table:style-name="ce1">
            <text:p>Free courses for jobs</text:p>
          </table:table-cell>
          <table:table-cell office:value-type="float" office:value="99027" table:style-name="ce4">
            <text:p>99027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table:number-columns-repeated="16366"/>
        </table:table-row>
        <table:table-row table:number-rows-repeated="1048571" table:style-name="ro3">
          <table:table-cell table:number-columns-repeated="16384"/>
        </table:table-row>
      </table:table>
      <table:table table:name="90000003_calculation_factors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" table:number-columns-repeated="16379" table:default-cell-style-name="ce1"/>
        <table:table-row table:style-name="ro3">
          <table:table-cell office:value-type="string" table:style-name="ce1">
            <text:p>Total funding (£)</text:p>
          </table:table-cell>
          <table:table-cell office:value-type="string" table:style-name="ce1">
            <text:p>Funding stream</text:p>
          </table:table-cell>
          <table:table-cell office:value-type="string" table:style-name="ce1">
            <text:p>Calculation factor</text:p>
          </table:table-cell>
          <table:table-cell office:value-type="string" table:style-name="ce1">
            <text:p>Current total</text:p>
          </table:table-cell>
          <table:table-cell table:number-columns-repeated="16380" table:style-name="ce1"/>
        </table:table-row>
        <table:table-row table:style-name="ro3">
          <table:table-cell office:value-type="float" office:value="4247865" table:style-name="ce6">
            <text:p>4,247,865.00</text:p>
          </table:table-cell>
          <table:table-cell office:value-type="string" table:style-name="ce1">
            <text:p>Adult skills fund</text:p>
          </table:table-cell>
          <table:table-cell office:value-type="string" table:style-name="ce1">
            <text:p>Adult skills fund grant - total including rate changes</text:p>
          </table:table-cell>
          <table:table-cell office:value-type="float" office:value="4415334.33" table:style-name="ce7">
            <text:p>£4,415,334.33<text:s/></text:p>
          </table:table-cell>
          <table:table-cell table:number-columns-repeated="2" table:style-name="ce8"/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baseline allocation</text:p>
          </table:table-cell>
          <table:table-cell office:value-type="float" office:value="4381954.25" table:style-name="ce7">
            <text:p>£4,381,954.25<text:s/></text:p>
          </table:table-cell>
          <table:table-cell table:number-columns-repeated="2" table:style-name="ce9"/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delivery proportion for academic year 2024 to 2025</text:p>
          </table:table-cell>
          <table:table-cell office:value-type="float" office:value="0.97" table:style-name="ce10">
            <text:p>0.97</text:p>
          </table:table-cell>
          <table:table-cell table:number-columns-repeated="2" table:style-name="ce8"/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delivery for academic year 2025 to 2026</text:p>
          </table:table-cell>
          <table:table-cell office:value-type="float" office:value="4381954.25" table:style-name="ce7">
            <text:p>£4,381,954.25<text:s/>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allocation for academic year 2025 to 2026</text:p>
          </table:table-cell>
          <table:table-cell office:value-type="float" office:value="4504325" table:style-name="ce12">
            <text:p>£4,504,325.00<text:s/></text:p>
          </table:table-cell>
          <table:table-cell table:number-columns-repeated="2" table:style-name="ce8"/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delivery for academic year 2024 to 2025</text:p>
          </table:table-cell>
          <table:table-cell office:value-type="float" office:value="4443917.1900000004" table:style-name="ce12">
            <text:p>£4,443,917.19<text:s/></text:p>
          </table:table-cell>
          <table:table-cell table:number-columns-repeated="2" table:style-name="ce9"/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allocation for academic year 2024 to 2025</text:p>
          </table:table-cell>
          <table:table-cell office:value-type="float" office:value="4504803" table:style-name="ce13">
            <text:p>£4,504,803.00<text:s/></text:p>
          </table:table-cell>
          <table:table-cell table:number-columns-repeated="2" table:style-name="ce9"/>
          <table:table-cell table:number-columns-repeated="16378"/>
        </table:table-row>
        <table:table-row table:style-name="ro2">
          <table:table-cell table:number-columns-repeated="2" table:style-name="ce1"/>
          <table:table-cell office:value-type="string" table:style-name="ce2">
            <text:p>Adult skills fund grant - academic year 2026 to 2027 funding rate changes using academic year 2024 to 2025 delivery</text:p>
          </table:table-cell>
          <table:table-cell office:value-type="float" office:value="33380.080000000002" table:style-name="ce12">
            <text:p>£33,380.08<text:s/></text:p>
          </table:table-cell>
          <table:table-cell table:number-columns-repeated="2" table:style-name="ce9"/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non devolved total</text:p>
          </table:table-cell>
          <table:table-cell office:value-type="float" office:value="4413658.55" table:style-name="ce12">
            <text:p>£4,413,658.55<text:s/></text:p>
          </table:table-cell>
          <table:table-cell table:number-columns-repeated="2" table:style-name="ce9"/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adult skills core split</text:p>
          </table:table-cell>
          <table:table-cell office:value-type="float" office:value="2084114.95" table:style-name="ce7">
            <text:p>£2,084,114.95<text:s/>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adult skills core devolved funding removed</text:p>
          </table:table-cell>
          <table:table-cell office:value-type="currency" office:value="-1676.78" table:style-name="ce14">
            <text:p>-£1,676.78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adult skills core delivery proportion in newly devolved area</text:p>
          </table:table-cell>
          <table:table-cell office:value-type="float" office:value="8.0000000000000002E-3" table:style-name="ce1">
            <text:p>0.008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tailored learning split</text:p>
          </table:table-cell>
          <table:table-cell office:value-type="currency" office:value="2331219.38" table:style-name="ce15">
            <text:p>£2,331,219.38<text:s/>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adult skills core affordability factor applied</text:p>
          </table:table-cell>
          <table:table-cell office:value-type="string" table:style-name="ce16">
            <text:p>£1,957.491.88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tailored learning affordability factor applied</text:p>
          </table:table-cell>
          <table:table-cell office:value-type="currency" office:value="2191346.2200000002" table:style-name="ce15">
            <text:p>£2,191,346.22<text:s/></text:p>
          </table:table-cell>
          <table:table-cell table:number-columns-repeated="16380" table:style-name="ce1"/>
        </table:table-row>
        <table:table-row table:style-name="ro3">
          <table:table-cell table:number-columns-repeated="2"/>
          <table:table-cell office:value-type="string" table:style-name="ce1">
            <text:p>Adult skills fund grant - adult skills core adjustments</text:p>
          </table:table-cell>
          <table:table-cell office:value-type="string" table:style-name="ce17">
            <text:p>£1,957.491.88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Adult skills fund grant - tailored learning adjustments</text:p>
          </table:table-cell>
          <table:table-cell office:value-type="currency" office:value="2203431.2200000002" table:style-name="ce15">
            <text:p>£2,203,431.22<text:s/>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- delivery proportion for academic year 2025 to 2026</text:p>
          </table:table-cell>
          <table:table-cell office:value-type="float" office:value="1.0980000000000001" table:style-name="ce1">
            <text:p>1.098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grant - delivery for academic year 2024 to 2025</text:p>
          </table:table-cell>
          <table:table-cell office:value-type="currency" office:value="87440.86" table:style-name="ce15">
            <text:p>£87,440.86<text:s/>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grant - delivery proportion for academic year 2024 to 2025</text:p>
          </table:table-cell>
          <table:table-cell office:value-type="float" office:value="0.57999999999999996" table:style-name="ce18">
            <text:p>0.58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grant - delivery for academic year 2025 to 2026</text:p>
          </table:table-cell>
          <table:table-cell office:value-type="currency" office:value="79622.86" table:style-name="ce15">
            <text:p>£79,622.86<text:s/>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grant - delivery for academic year 2024 to 2025</text:p>
          </table:table-cell>
          <table:table-cell office:value-type="currency" office:value="75720.240000000005" table:style-name="ce9">
            <text:p>£75,72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grant - allocation for academic year 2023 to 2024<text:s/></text:p>
          </table:table-cell>
          <table:table-cell office:value-type="currency" office:value="130443" table:style-name="ce15">
            <text:p>£130,443.00<text:s/>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grant - baseline allocation<text:s/></text:p>
          </table:table-cell>
          <table:table-cell office:value-type="float" office:value="87440.86" table:style-name="ce12">
            <text:p>£87,440.86<text:s/>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grant - delivery adjusted for academic year 2024 to 2025 devolved areas</text:p>
          </table:table-cell>
          <table:table-cell office:value-type="currency" office:value="87440.86" table:style-name="ce15">
            <text:p>£87,440.86<text:s/>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Free courses for jobs grant - academic year 2026 to 2027 funding rate changes using academic year 2024 to 2025 delivery</text:p>
          </table:table-cell>
          <table:table-cell office:value-type="currency" office:value="11586.6" table:style-name="ce15">
            <text:p>£11,586.60<text:s/>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grant - adjustments</text:p>
          </table:table-cell>
          <table:table-cell office:value-type="currency" office:value="99027.46" table:style-name="ce15">
            <text:p>£99,027.46<text:s/></text:p>
          </table:table-cell>
          <table:table-cell table:number-columns-repeated="16380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36" number:language="en" number:country="GB">
      <style:text-properties fo:color="#FF0000"/>
      <number:text>(</number:text>
      <number:currency-symbol number:language="en" number:country="GB">£</number:currency-symbol>
      <number:number number:decimal-places="2" number:min-decimal-places="2" number:min-integer-digits="1" number:grouping="true"/>
      <number:text>)</number:text>
      <style:map style:condition="value()&gt;=0" style:apply-style-name="N36P0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number-style style:name="N37">
      <style:text-properties fo:color="#FF0000"/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number-style style:name="N39">
      <number:number number:decimal-places="1" number:min-decimal-places="1" number:min-integer-digits="1"/>
    </number:number-style>
    <number:currency-style style:name="N40P0" number:language="en" number:country="GB">
      <number:currency-symbol number:language="en" number:country="GB">£</number:currency-symbol>
      <number:number number:decimal-places="0" number:min-decimal-places="0" number:min-integer-digits="1" number:grouping="true"/>
      <number:text> </number:text>
    </number:currency-style>
    <number:number-style style:name="N40">
      <style:text-properties fo:color="#FF0000"/>
      <number:text>(£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40P0"/>
    </number:number-style>
    <number:currency-style style:name="N41" number:language="en" number:country="GB">
      <number:currency-symbol number:language="en" number:country="GB">£</number:currency-symbol>
      <number:number number:decimal-places="0" number:min-decimal-places="0" number:min-integer-digits="1" number:grouping="true"/>
    </number:currency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_32_cent" style:display-name="Per cent" style:family="table-cell" style:data-style-name="N13"/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ptos" style:font-name-asian="Aptos" style:font-name-complex="Aptos" fo:font-size="11pt" style:font-size-asian="11pt" style:font-size-complex="11pt"/>
    </style:style>
    <style:style style:name="T2" style:family="text">
      <style:text-properties fo:color="#000000" style:font-name="Aptos" style:font-name-asian="Aptos" style:font-name-complex="Aptos" fo:font-size="1pt" style:font-size-asian="1pt" style:font-size-complex="1pt"/>
    </style:style>
    <style:style style:name="T3" style:family="text">
      <style:text-properties fo:color="#000000" style:font-name="Aptos Narrow" style:font-name-asian="Aptos Narrow" style:font-name-complex="Aptos Narrow" fo:font-size="1pt" style:font-size-asian="1pt" style:font-size-complex="1pt"/>
    </style:style>
    <style:style style:name="T4" style:family="text">
      <style:text-properties fo:color="#000000" style:font-name="Aptos" style:font-name-asian="Aptos" style:font-name-complex="Aptos" fo:font-size="11pt" style:font-size-asian="11pt" style:font-size-complex="11pt"/>
    </style:style>
  </office:automatic-styles>
  <office:master-styles>
    <style:master-page style:name="mp1" style:page-layout-name="pm1">
      <style:header>
        <text:p><text:span text:style-name="T1"><text:s/></text:span><text:span text:style-name="T1">OFFICIAL-SENSITIVE</text:span><text:span text:style-name="T2">#</text:span></text:p>
        <text:p/>
      </style:header>
      <style:header-left style:display="false"/>
      <style:header-first/>
      <style:footer>
        <text:p/>
        <text:p><text:span text:style-name="T3">#</text:span><text:span text:style-name="T4"> </text:span><text:span text:style-name="T4">OFFICIAL-SENSITIVE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517</meta:generator>
    <dc:title/>
    <dc:description/>
    <dc:subject/>
    <meta:initial-creator/>
    <dc:creator>MACKENZIE, Naomi</dc:creator>
    <meta:creation-date>2026-04-22T15:38:03Z</meta:creation-date>
    <dc:date>2026-05-22T10:43:21Z</dc:date>
    <meta:user-defined meta:name="MSIP_Label_74cd0398-e695-42be-8c09-2ec08db47b05_Enabled">true</meta:user-defined>
    <meta:user-defined meta:name="MSIP_Label_74cd0398-e695-42be-8c09-2ec08db47b05_SetDate">2026-04-22T15:38:03Z</meta:user-defined>
    <meta:user-defined meta:name="MSIP_Label_74cd0398-e695-42be-8c09-2ec08db47b05_Method">Standard</meta:user-defined>
    <meta:user-defined meta:name="MSIP_Label_74cd0398-e695-42be-8c09-2ec08db47b05_Name">OFFICIAL-SENSITIVE - no handling instructions</meta:user-defined>
    <meta:user-defined meta:name="MSIP_Label_74cd0398-e695-42be-8c09-2ec08db47b05_SiteId">fad277c9-c60a-4da1-b5f3-b3b8b34a82f9</meta:user-defined>
    <meta:user-defined meta:name="MSIP_Label_74cd0398-e695-42be-8c09-2ec08db47b05_ActionId">45afb2be-2480-4cb6-9d39-8491ad71cdbf</meta:user-defined>
    <meta:user-defined meta:name="MSIP_Label_74cd0398-e695-42be-8c09-2ec08db47b05_ContentBits">0</meta:user-defined>
  </office:meta>
</office:document-meta>
</file>