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41"/>
    <style:style style:name="ce5" style:family="table-cell" style:parent-style-name="Default" style:data-style-name="N1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style:vertical-align="automatic" fo:wrap-option="wrap"/>
    </style:style>
    <style:style style:name="ce13" style:family="table-cell" style:parent-style-name="Per_32_cent" style:data-style-name="N36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38">
      <style:text-properties fo:font-weight="bold" style:font-weight-asian="bold" style:font-weight-complex="bold"/>
    </style:style>
    <style:style style:name="ce15" style:family="table-cell" style:parent-style-name="Default" style:data-style-name="N38">
      <style:table-cell-properties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4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4.365625cm"/>
    </style:style>
    <style:style style:name="co12" style:family="table-column">
      <style:table-column-properties fo:break-before="auto" style:column-width="11.8004166666667cm"/>
    </style:style>
    <style:style style:name="ro1" style:family="table-row">
      <style:table-row-properties style:row-height="61.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9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3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UKPRN</text:p>
          </table:table-cell>
          <table:table-cell office:value-type="string" table:style-name="ce2">
            <text:p>Funding reference</text:p>
          </table:table-cell>
          <table:table-cell office:value-type="string" table:style-name="ce2">
            <text:p>Funding <text:s/>period</text:p>
          </table:table-cell>
          <table:table-cell office:value-type="string" table:style-name="ce2">
            <text:p>Total funding (£)</text:p>
          </table:table-cell>
          <table:table-cell office:value-type="string" table:style-name="ce2">
            <text:p>Funding line item</text:p>
          </table:table-cell>
          <table:table-cell office:value-type="string" table:style-name="ce2">
            <text:p>Funding line total (£)</text:p>
          </table:table-cell>
          <table:table-cell office:value-type="string" table:style-name="ce2">
            <text:p>Distribution period: August 2026 (£)</text:p>
          </table:table-cell>
          <table:table-cell office:value-type="string" table:style-name="ce2">
            <text:p>Distribution period: September 2026 <text:s/>(£)</text:p>
          </table:table-cell>
          <table:table-cell office:value-type="string" table:style-name="ce2">
            <text:p>Distribution period: October 2026 <text:s/>(£)</text:p>
          </table:table-cell>
          <table:table-cell office:value-type="string" table:style-name="ce2">
            <text:p>Distribution period: November 2026 <text:s/>(£)</text:p>
          </table:table-cell>
          <table:table-cell office:value-type="string" table:style-name="ce2">
            <text:p>Distribution period: December 2026 <text:s/>(£)</text:p>
          </table:table-cell>
          <table:table-cell office:value-type="string" table:style-name="ce2">
            <text:p>Distribution period: January 2027 <text:s/>(£)</text:p>
          </table:table-cell>
          <table:table-cell office:value-type="string" table:style-name="ce2">
            <text:p>Distribution period: February 2027 <text:s/>(£)</text:p>
          </table:table-cell>
          <table:table-cell office:value-type="string" table:style-name="ce2">
            <text:p>Distribution period: March 2027 (£)</text:p>
          </table:table-cell>
          <table:table-cell office:value-type="string" table:style-name="ce2">
            <text:p>Distribution period: April 2027 (£)</text:p>
          </table:table-cell>
          <table:table-cell office:value-type="string" table:style-name="ce2">
            <text:p>Distribution period: May 2027 (£)</text:p>
          </table:table-cell>
          <table:table-cell office:value-type="string" table:style-name="ce2">
            <text:p>Distribution period: June 2027 (£)</text:p>
          </table:table-cell>
          <table:table-cell office:value-type="string" table:style-name="ce2">
            <text:p>Distribution period: July 2027 (£)</text:p>
          </table:table-cell>
          <table:table-cell table:number-columns-repeated="16366"/>
        </table:table-row>
        <table:table-row table:style-name="ro2">
          <table:table-cell office:value-type="float" office:value="900000003" table:style-name="ce1">
            <text:p>900000003</text:p>
          </table:table-cell>
          <table:table-cell office:value-type="string" table:style-name="ce1">
            <text:p>Pupil premium</text:p>
          </table:table-cell>
          <table:table-cell office:value-type="string" table:style-name="ce2">
            <text:p>Academic year 2027 to 2027</text:p>
          </table:table-cell>
          <table:table-cell office:value-type="float" office:value="156650" table:style-name="ce3">
            <text:p>156650.00</text:p>
          </table:table-cell>
          <table:table-cell office:value-type="string" table:style-name="ce1">
            <text:p>Pupil premium funding</text:p>
          </table:table-cell>
          <table:table-cell office:value-type="float" office:value="156650" table:style-name="ce3">
            <text:p>156650.00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office:value-type="float" office:value="13054.17" table:style-name="ce3">
            <text:p>13054.17</text:p>
          </table:table-cell>
          <table:table-cell table:number-columns-repeated="16366"/>
        </table:table-row>
        <table:table-row table:style-name="ro3">
          <table:table-cell table:number-columns-repeated="8" table:style-name="ce1"/>
          <table:table-cell table:style-name="ce4"/>
          <table:table-cell table:number-columns-repeated="16375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number-rows-repeated="1048571" table:style-name="ro4">
          <table:table-cell table:number-columns-repeated="16384"/>
        </table:table-row>
      </table:table>
      <table:table table:name="90000003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6"/>
        <table:table-column table:style-name="co7" table:default-cell-style-name="ce6"/>
        <table:table-column table:style-name="co11" table:default-cell-style-name="ce1"/>
        <table:table-column table:style-name="co12" table:default-cell-style-name="ce2"/>
        <table:table-column table:style-name="co1" table:number-columns-repeated="16377" table:default-cell-style-name="ce1"/>
        <table:table-row table:style-name="ro3">
          <table:table-cell office:value-type="string" table:style-name="ce1">
            <text:p>Total funding (£)</text:p>
          </table:table-cell>
          <table:table-cell office:value-type="string" table:style-name="ce1">
            <text:p>Funding stream</text:p>
          </table:table-cell>
          <table:table-cell office:value-type="string" table:style-name="ce2">
            <text:p>Calculation breakdown</text:p>
          </table:table-cell>
          <table:table-cell office:value-type="string" table:style-name="ce6">
            <text:p>Calculation</text:p>
          </table:table-cell>
          <table:table-cell office:value-type="string" table:style-name="ce6">
            <text:p>Value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office:value-type="float" office:value="156650" table:style-name="ce9">
            <text:p>156,650.00</text:p>
          </table:table-cell>
          <table:table-cell office:value-type="string" table:style-name="ce1">
            <text:p>Pupil premium</text:p>
          </table:table-cell>
          <table:table-cell table:style-name="ce2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students eligible for pupil premium</text:p>
          </table:table-cell>
          <table:table-cell table:style-name="ce6"/>
          <table:table-cell table:style-name="ce13"/>
          <table:table-cell table:style-name="ce14"/>
          <table:table-cell table:style-name="ce15"/>
          <table:table-cell table:number-columns-repeated="16377" table:style-name="ce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service child premium excluding alternative provision reporting</text:p>
          </table:table-cell>
          <table:table-cell table:style-name="ce16"/>
          <table:table-cell office:value-type="float" office:value="0" table:style-name="ce6">
            <text:p>0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looked-after child pupil premium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0" table:style-name="ce6">
            <text:p>0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previously looked-after child pupil premium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rimary pupils eligible for the deprivation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52" table:style-name="ce6">
            <text:p>5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secondary pupils eligible for the deprivation excluding alternative provision reporting</text:p>
          </table:table-cell>
          <table:table-cell office:value-type="string" table:style-name="ce6">
            <text:p>+</text:p>
          </table:table-cell>
          <table:table-cell office:value-type="float" office:value="71" table:style-name="ce6">
            <text:p>71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125" table:style-name="ce6">
            <text:p>125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service child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1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service child premium</text:p>
          </table:table-cell>
          <table:table-cell office:value-type="string" table:style-name="ce6">
            <text:p>x</text:p>
          </table:table-cell>
          <table:table-cell office:value-type="percentage" office:value="0" table:style-name="ce20">
            <text:p>0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looked-after child pupil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1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looked-after child pupil premium<text:s/></text:p>
          </table:table-cell>
          <table:table-cell office:value-type="string" table:style-name="ce6">
            <text:p>x</text:p>
          </table:table-cell>
          <table:table-cell office:value-type="percentage" office:value="0" table:style-name="ce20">
            <text:p>0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3">
          <table:table-cell table:number-columns-repeated="2" table:style-name="ce1"/>
          <table:table-cell table:style-name="ce2"/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Number of pupils eligible for the previously looked-after child pupil premium excluding alternative provision reporting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Number of pupils on roll</text:p>
          </table:table-cell>
          <table:table-cell table:style-name="ce6"/>
          <table:table-cell office:value-type="float" office:value="223" table:style-name="ce1">
            <text:p>2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">
            <text:p>Percentage of pupils eligible for the looked-after child pupil premium<text:s/></text:p>
          </table:table-cell>
          <table:table-cell office:value-type="string" table:style-name="ce6">
            <text:p>x</text:p>
          </table:table-cell>
          <table:table-cell office:value-type="percentage" office:value="1E-4" table:style-name="ce21">
            <text:p>0.01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number-columns-repeated="16377" table:style-name="ce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office:value-type="string" table:style-name="ce2">
            <text:p>Number of primary pupils eligible for the deprivation pupil premium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Number of primary pupils on roll</text:p>
          </table:table-cell>
          <table:table-cell table:style-name="ce6"/>
          <table:table-cell office:value-type="float" office:value="116" table:style-name="ce6">
            <text:p>116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Percentage of prim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percentage" office:value="0.44819999999999999" table:style-name="ce21">
            <text:p>44.82%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52" table:style-name="ce6">
            <text:p>5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office:value-type="string" table:style-name="ce2">
            <text:p>Number of secondary pupils eligible for the deprivation pupil premium</text:p>
          </table:table-cell>
          <table:table-cell table:number-columns-repeated="2" table:style-name="ce6"/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Number of secondary pupils on roll</text:p>
          </table:table-cell>
          <table:table-cell table:style-name="ce6"/>
          <table:table-cell office:value-type="float" office:value="107" table:style-name="ce6">
            <text:p>107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">
            <text:p>Percentage of second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percentage" office:value="0.66349999999999998" table:style-name="ce21">
            <text:p>66.35%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float" office:value="71" table:style-name="ce6">
            <text:p>71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2">
            <text:p>Total pupil premium funding</text:p>
          </table:table-cell>
          <table:table-cell table:number-columns-repeated="2" table:style-name="ce6"/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Service child pupil premium allocation excluding alternative provision reporting</text:p>
          </table:table-cell>
          <table:table-cell table:style-name="ce6"/>
          <table:table-cell office:value-type="currency" office:value="0" table:style-name="ce22">
            <text:p>£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Looked-after child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0" table:style-name="ce22">
            <text:p>£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Previously looked-after child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5140" table:style-name="ce22">
            <text:p>£5,14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Primary deprivation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76960" table:style-name="ce23">
            <text:p>£76,960.0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Secondary deprivation pupil premium allocation excluding alternative provision reporting</text:p>
          </table:table-cell>
          <table:table-cell office:value-type="string" table:style-name="ce6">
            <text:p>+</text:p>
          </table:table-cell>
          <table:table-cell office:value-type="currency" office:value="74550" table:style-name="ce23">
            <text:p>£74,550.00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156650" table:style-name="ce23">
            <text:p>£156,650.00</text:p>
          </table:table-cell>
          <table:table-cell table:number-columns-repeated="16379"/>
        </table:table-row>
        <table:table-row table:style-name="ro3">
          <table:table-cell table:number-columns-repeated="2"/>
          <table:table-cell table:style-name="ce2"/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Service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Service child pupil premium rate</text:p>
          </table:table-cell>
          <table:table-cell table:style-name="ce6"/>
          <table:table-cell office:value-type="currency" office:value="340" table:style-name="ce24">
            <text:p>£34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upils eligible for the service child premium</text:p>
          </table:table-cell>
          <table:table-cell office:value-type="string" table:style-name="ce6">
            <text:p>x</text:p>
          </table:table-cell>
          <table:table-cell office:value-type="currency" office:value="0" table:style-name="ce22">
            <text:p>£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0" table:style-name="ce22">
            <text:p>£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Looked-after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Looked-after child pupil premium rate</text:p>
          </table:table-cell>
          <table:table-cell table:style-name="ce6"/>
          <table:table-cell office:value-type="currency" office:value="2570" table:style-name="ce24">
            <text:p>£2,57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upils eligible for the looked-after child pupil premium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0" table:style-name="ce22">
            <text:p>£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Previously looked-after child pupil premium allocation excluding alternative provision reporting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Previously looked-after child pupil premium rate</text:p>
          </table:table-cell>
          <table:table-cell table:style-name="ce6"/>
          <table:table-cell office:value-type="currency" office:value="2570" table:style-name="ce24">
            <text:p>£2,57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upils eligible for the previously looked-after child pupil premium</text:p>
          </table:table-cell>
          <table:table-cell office:value-type="string" table:style-name="ce6">
            <text:p>x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5140" table:style-name="ce24">
            <text:p>£5,140.0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1">
            <text:p>Primary pupil premium deprivation allocation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Primary deprivation pupil premium rate</text:p>
          </table:table-cell>
          <table:table-cell table:style-name="ce6"/>
          <table:table-cell office:value-type="currency" office:value="1480" table:style-name="ce24">
            <text:p>£1,48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prim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float" office:value="57" table:style-name="ce6">
            <text:p>57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84360" table:style-name="ce24">
            <text:p>£84,360.0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">
            <text:p>Secondary pupil premium deprivation allocation</text:p>
          </table:table-cell>
          <table:table-cell table:number-columns-repeated="2" table:style-name="ce6"/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1">
            <text:p>Secondary deprivation pupil premium rate</text:p>
          </table:table-cell>
          <table:table-cell table:style-name="ce6"/>
          <table:table-cell office:value-type="currency" office:value="1050" table:style-name="ce23">
            <text:p>£1,050.00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Number of secondary pupils eligible for the deprivation pupil premium</text:p>
          </table:table-cell>
          <table:table-cell office:value-type="string" table:style-name="ce6">
            <text:p>x</text:p>
          </table:table-cell>
          <table:table-cell office:value-type="float" office:value="71" table:style-name="ce6">
            <text:p>71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2">
            <text:p>Total</text:p>
          </table:table-cell>
          <table:table-cell office:value-type="string" table:style-name="ce19">
            <text:p>=</text:p>
          </table:table-cell>
          <table:table-cell office:value-type="currency" office:value="74550" table:style-name="ce23">
            <text:p>£74,550.00</text:p>
          </table:table-cell>
          <table:table-cell table:number-columns-repeated="16379"/>
        </table:table-row>
        <table:table-row table:number-rows-repeated="104850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number-style style:name="N36" number:language="en" number:country="GB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36P0"/>
    </number:number-style>
    <number:currency-style style:name="N37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number-style style:name="N37" number:language="en" number:country="GB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9P0" number:language="en" number:country="US">
      <number:currency-symbol number:language="en" number:country="US">£</number:currency-symbol>
      <number:number number:decimal-places="0" number:min-decimal-places="0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£</number:currency-symbol>
      <number:number number:decimal-places="0" number:min-decimal-places="0" number:min-integer-digits="1" number:grouping="true"/>
      <style:map style:condition="value()&gt;=0" style:apply-style-name="N39P0"/>
    </number:currency-style>
    <number:currency-style style:name="N40P0" number:language="en" number:country="US">
      <number:currency-symbol number:language="en" number:country="US">£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£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306</meta:generator>
    <dc:title/>
    <dc:description/>
    <dc:subject/>
    <meta:initial-creator/>
    <dc:creator>HALLSWORTH, Emily</dc:creator>
    <meta:creation-date>2026-04-22T15:38:03Z</meta:creation-date>
    <dc:date>2026-07-17T12:09:35Z</dc:date>
    <meta:user-defined meta:name="MSIP_Label_74cd0398-e695-42be-8c09-2ec08db47b05_Enabled">true</meta:user-defined>
    <meta:user-defined meta:name="MSIP_Label_74cd0398-e695-42be-8c09-2ec08db47b05_SetDate">2026-04-22T15:38:03Z</meta:user-defined>
    <meta:user-defined meta:name="MSIP_Label_74cd0398-e695-42be-8c09-2ec08db47b05_Method">Standard</meta:user-defined>
    <meta:user-defined meta:name="MSIP_Label_74cd0398-e695-42be-8c09-2ec08db47b05_Name">OFFICIAL-SENSITIVE - no handling instructions</meta:user-defined>
    <meta:user-defined meta:name="MSIP_Label_74cd0398-e695-42be-8c09-2ec08db47b05_SiteId">fad277c9-c60a-4da1-b5f3-b3b8b34a82f9</meta:user-defined>
    <meta:user-defined meta:name="MSIP_Label_74cd0398-e695-42be-8c09-2ec08db47b05_ActionId">45afb2be-2480-4cb6-9d39-8491ad71cdbf</meta:user-defined>
    <meta:user-defined meta:name="MSIP_Label_74cd0398-e695-42be-8c09-2ec08db47b05_ContentBits">0</meta:user-defined>
  </office:meta>
</office:document-meta>
</file>